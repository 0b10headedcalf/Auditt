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<text:bookmark-start text:name="your-name"/>[Your Name]<text:bookmark-end text:name="your-name"/></text:h>
      <text:p text:style-name="First_20_paragraph">[City, State] · [email@example.com] · [LinkedIn URL] · [GitHub URL]</text:p>
      <text:p text:style-name="Horizontal_20_Line"/>
      <text:h text:style-name="Heading_20_2" text:outline-level="2"><text:bookmark-start text:name="summary"/>Summary<text:bookmark-end text:name="summary"/></text:h>
      <text:p text:style-name="First_20_paragraph">[2-3 sentence professional summary. Replace this with your actual background.]</text:p>
      <text:p text:style-name="Horizontal_20_Line"/>
      <text:h text:style-name="Heading_20_2" text:outline-level="2"><text:bookmark-start text:name="skills"/>Skills<text:bookmark-end text:name="skills"/></text:h>
      <text:p text:style-name="First_20_paragraph"><text:span text:style-name="T1">Languages:</text:span> [e.g. Python, TypeScript, Go, SQL] <text:span text:style-name="T1">Frameworks:</text:span> [e.g. React, FastAPI, Node.js] <text:span text:style-name="T1">Tools &amp; Platforms:</text:span> [e.g. AWS, Docker, Kubernetes, PostgreSQL] <text:span text:style-name="T1">Other:</text:span> [e.g. REST APIs, CI/CD, Agile]</text:p>
      <text:p text:style-name="Horizontal_20_Line"/>
      <text:h text:style-name="Heading_20_2" text:outline-level="2"><text:bookmark-start text:name="experience"/>Experience<text:bookmark-end text:name="experience"/></text:h>
      <text:h text:style-name="Heading_20_3" text:outline-level="3"><text:bookmark-start text:name="job-title-company-name"/>[Job Title] · [Company Name]<text:bookmark-end text:name="job-title-company-name"/></text:h>
      <text:p text:style-name="First_20_paragraph"><text:span text:style-name="T2">[Month Year] – [Month Year or Present] · [City, State or Remote]</text:span></text:p>
      <text:list text:style-name="L1">
        <text:list-item>
          <text:p text:style-name="P1">[Achievement or responsibility. Start with an action verb. Quantify where possible, e.g. “Reduced API latency by 40% by…”]</text:p>
        </text:list-item>
        <text:list-item>
          <text:p text:style-name="P1">[Achievement or responsibility]</text:p>
        </text:list-item>
        <text:list-item>
          <text:p text:style-name="P1">[Achievement or responsibility]</text:p>
        </text:list-item>
      </text:list>
      <text:h text:style-name="Heading_20_3" text:outline-level="3"><text:bookmark-start text:name="job-title-company-name-1"/>[Job Title] · [Company Name]<text:bookmark-end text:name="job-title-company-name-1"/></text:h>
      <text:p text:style-name="First_20_paragraph"><text:span text:style-name="T2">[Month Year] – [Month Year] · [City, State or Remote]</text:span></text:p>
      <text:list text:style-name="L2">
        <text:list-item>
          <text:p text:style-name="P2">[Achievement or responsibility]</text:p>
        </text:list-item>
        <text:list-item>
          <text:p text:style-name="P2">[Achievement or responsibility]</text:p>
        </text:list-item>
        <text:list-item>
          <text:p text:style-name="P2">[Achievement or responsibility]</text:p>
        </text:list-item>
      </text:list>
      <text:p text:style-name="Horizontal_20_Line"/>
      <text:h text:style-name="Heading_20_2" text:outline-level="2"><text:bookmark-start text:name="projects"/>Projects<text:bookmark-end text:name="projects"/></text:h>
      <text:h text:style-name="Heading_20_3" text:outline-level="3"><text:bookmark-start text:name="project-name"/>[Project Name]<text:bookmark-end text:name="project-name"/></text:h>
      <text:p text:style-name="First_20_paragraph"><text:span text:style-name="T2">[Tech stack used]</text:span></text:p>
      <text:p text:style-name="Text_20_body">[1-2 sentence description. What it does, your role, impact or usage stats.]</text:p>
      <text:p text:style-name="Text_20_body">[GitHub or live link]</text:p>
      <text:p text:style-name="Horizontal_20_Line"/>
      <text:h text:style-name="Heading_20_2" text:outline-level="2"><text:bookmark-start text:name="education"/>Education<text:bookmark-end text:name="education"/></text:h>
      <text:h text:style-name="Heading_20_3" text:outline-level="3"><text:bookmark-start text:name="degree-in-field-university-name"/>[Degree] in [Field] · [University Name]<text:bookmark-end text:name="degree-in-field-university-name"/></text:h>
      <text:p text:style-name="First_20_paragraph"><text:span text:style-name="T2">[Year Graduated]</text:span></text:p>
      <text:p text:style-name="Text_20_body">[Relevant coursework, honors, or GPA if strong — optional]</text:p>
      <text:p text:style-name="Horizontal_20_Line"/>
      <text:h text:style-name="Heading_20_2" text:outline-level="2"><text:bookmark-start text:name="certifications-optional"/>Certifications <text:span text:style-name="T2">(optional)</text:span><text:bookmark-end text:name="certifications-optional"/></text:h>
      <text:list text:style-name="L3">
        <text:list-item>
          <text:p text:style-name="P3">[Certification Name] · [Issuer] · [Year]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</meta:generator>
    <dc:title/>
    <dc:description/>
    <dc:subject/>
    <meta:keyword/>
    <meta:initial-creator/>
    <dc:creator/>
    <meta:creation-date>2026-05-04T20:53:07Z</meta:creation-date>
    <dc:date>2026-05-04T20:53:07Z</dc:date>
  </office:meta>
</office:document-meta>
</file>